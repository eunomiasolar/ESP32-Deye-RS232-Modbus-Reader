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F000001C711B466FBF7FA686A.jpg" manifest:media-type="image/jpeg"/>
  <manifest:file-entry manifest:full-path="Pictures/100000000000029B00000375E49F3C30D0C847D6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1817a" officeooo:paragraph-rsid="0011817a"/>
    </style:style>
    <style:style style:name="P2" style:family="paragraph" style:parent-style-name="Preformatted_20_Text">
      <style:text-properties officeooo:paragraph-rsid="0011817a"/>
    </style:style>
    <style:style style:name="P3" style:family="paragraph" style:parent-style-name="Preformatted_20_Text">
      <style:text-properties fo:font-size="8pt" officeooo:rsid="0011817a" officeooo:paragraph-rsid="0011817a" style:font-size-asian="8pt" style:font-size-complex="8pt"/>
    </style:style>
    <style:style style:name="P4" style:family="paragraph" style:parent-style-name="Preformatted_20_Text">
      <style:text-properties fo:font-size="10pt" officeooo:rsid="0011817a" officeooo:paragraph-rsid="0011817a" style:font-size-asian="10pt" style:font-size-complex="10pt"/>
    </style:style>
    <style:style style:name="T1" style:family="text">
      <style:text-properties officeooo:rsid="0011817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I wanted to read data from my Deye Inverter (Moddle SUN-5K-SG03LP1-EU) but my model do not have the RS486 plug fitted as shown in the Deye manual that mention it is "available on SOME modles". </text:p>
      <text:p text:style-name="Preformatted_20_Text"/>
      <text:p text:style-name="Preformatted_20_Text">So RS232 is the only option. I downloaded 3 programs for ESP32 that claim to read RS232 data, but none worked om my inverter. The Modbus address they use are not valid/available on my inverter RS232 port.</text:p>
      <text:p text:style-name="Preformatted_20_Text"/>
      <text:p text:style-name="Preformatted_20_Text">I could not find any documentation on the Internet on Deye RS232 Modbus protocol. (If you have it please send to "EunomiaSolar" at gmail.)</text:p>
      <text:p text:style-name="Preformatted_20_Text"/>
      <text:p text:style-name="Preformatted_20_Text">I spend a whole week experimenting with an ESP32 and this program to search for the data I needed on my inverter.I found 9600 Baud, 8 bits, no parity, 1 stop bit works fine.</text:p>
      <text:p text:style-name="Preformatted_20_Text"/>
      <text:p text:style-name="P2"><text:span text:style-name="T1">You can find my experiment in :</text:span></text:p>
      <text:p text:style-name="P2"><text:span text:style-name="T1"><text:tab/></text:span><text:a xlink:type="simple" xlink:href="http://ModbusRS232RegistersSearching/" text:style-name="Internet_20_link" text:visited-style-name="Visited_20_Internet_20_Link"><text:span text:style-name="T1">RS232RegisterSearcher</text:span></text:a></text:p>
      <text:p text:style-name="P1"/>
      <text:p text:style-name="P1">Then I wrote a sketch to diaplay the registers I found on the serial console in an infinate loop:</text:p>
      <text:p text:style-name="P2"><text:span text:style-name="T1"><text:tab/></text:span><text:a xlink:type="simple" xlink:href="http://BasicRS232DeyeModbusReader/" text:style-name="Internet_20_link" text:visited-style-name="Visited_20_Internet_20_Link"><text:span text:style-name="T1">BasicRS232DeyeReader</text:span></text:a></text:p>
      <text:p text:style-name="P1"/>
      <text:p text:style-name="P1">And finaly a fully usable App that display these registers via WiFi on a browser and generate a “LogYY-MM-DD_hh_mm.csv” file with entries every 10 seconds and transfer this 0.5 GB file via FTP to a PC ftp server that run somewhere on the WiFi network.</text:p>
      <text:p text:style-name="P2"><text:span text:style-name="T1"><text:tab/></text:span><text:a xlink:type="simple" xlink:href="http://ModbusMonitor/" text:style-name="Internet_20_link" text:visited-style-name="Visited_20_Internet_20_Link"><text:span text:style-name="T1">ModbusMonitor</text:span></text:a></text:p>
      <text:p text:style-name="P1"/>
      <text:p text:style-name="P1"><draw:frame draw:style-name="fr2" draw:name="Image1" text:anchor-type="char" svg:width="12.864cm" svg:height="14.342cm" draw:z-index="0"><draw:image xlink:href="Pictures/100000000000029B00000375E49F3C30D0C847D6.jpg" xlink:type="simple" xlink:show="embed" xlink:actuate="onLoad" draw:mime-type="image/jpeg"/></draw:frame>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The “.csv” file look like this:</text:p>
      <text:p text:style-name="P3"/>
      <text:p text:style-name="P3">Seq;PV1_V;PV1_A;PV1_W;PV2_V;PV2_A;PV2_W;POW W;BMS V;CHG V;%;DIS A;CHG AH;DIS AH;PV WH</text:p>
      <text:p text:style-name="P3">10; 11.10; 0.00; 0.00; 11.10; <text:s/>0.10; <text:s/>1.00; <text:s/>-51.00; 55.20; 53.33; 74.00; -0.69; <text:s/>0.00;...</text:p>
      <text:p text:style-name="P3">21; 11.10; 0.00; 0.00; 11.00; <text:s/>0.10; <text:s/>1.00; <text:s/>-50.00; 55.20; 53.33; 74.00; -0.69; <text:s/>0.00;...</text:p>
      <text:p text:style-name="P3">33; 11.10; 0.00; 0.00; 11.10; <text:s/>0.10; <text:s/>1.00; <text:s/>-50.00; 55.20; 53.33; 74.00; -0.68; <text:s/>0.00;...</text:p>
      <text:p text:style-name="P3">45; 11.10; 0.00; 0.00; 11.10; <text:s/>0.10; <text:s/>1.00; <text:s/>-50.00; 55.20; 53.33; 74.00; -0.67; <text:s/>0.00;...</text:p>
      <text:p text:style-name="P3">57; 11.10; 0.00; 0.00; 11.10; <text:s/>0.10; <text:s/>1.00; <text:s/>-51.00; 53.63; 53.33; 74.00; -0.67; <text:s/>0.14;...</text:p>
      <text:p text:style-name="P3">69; 11.20; 0.00; 0.00; 11.20; <text:s/>0.10; <text:s/>1.00; <text:s/>-50.00; 55.20; 53.33; 74.00; -0.68; <text:s/>0.14;...</text:p>
      <text:p text:style-name="P3">81; 11.20; 0.00; 0.00; 11.20; <text:s/>0.10; <text:s/>1.00; <text:s/>-50.00; 55.20; 53.33; 74.00; -0.71; <text:s/>0.14;...</text:p>
      <text:p text:style-name="P3">93; 11.20; 0.00; 0.00; 11.20; <text:s/>0.10; <text:s/>1.00; <text:s/>-50.00; 55.20; 53.33; 74.00; -0.67; <text:s/>0.14;...</text:p>
      <text:p text:style-name="P3">105;11.30; 0.00; 0.00; 11.20; <text:s/>0.10; <text:s/>1.00; <text:s/>-50.00; 55.20; 53.33; 74.00; -0.69; <text:s/>0.14;...</text:p>
      <text:p text:style-name="Preformatted_20_Text"/>
      <text:p text:style-name="P1">I use the following script to generate a graph with “gnuplot” :</text:p>
      <text:p text:style-name="P1"/>
      <text:p text:style-name="P3">set datafile separator ';'</text:p>
      <text:p text:style-name="P3">set key autotitle columnhead # use the first line as title</text:p>
      <text:p text:style-name="P3">set ylabel "Volt" # label for the Y axis</text:p>
      <text:p text:style-name="P3">set xlabel 'Time' # label for the X axis</text:p>
      <text:p text:style-name="P3">set x2label '17H00 <text:s text:c="3"/>19H00 <text:s text:c="2"/>21H00 <text:s/>23H00 <text:s/>01H00 <text:s/>03H00 <text:s text:c="3"/>05H00 <text:s text:c="2"/>07H00 09H00 <text:s/>11H00 <text:s/>13H00 15H00 <text:s/>16H59' # label for the X2 axis</text:p>
      <text:p text:style-name="P3">set y2tics <text:s text:c="8"/># enable second axis</text:p>
      <text:p text:style-name="P3">set ytics nomirror # dont show the tics on that side</text:p>
      <text:p text:style-name="P3">set y2label "AMPS / Percent SOC" # label for second axis</text:p>
      <text:p text:style-name="P3">set xrange [0:87000]</text:p>
      <text:p text:style-name="P3">set yrange [48:56]</text:p>
      <text:p text:style-name="P3">set y2range [-80:190]</text:p>
      <text:p text:style-name="P3">set key left top</text:p>
      <text:p text:style-name="P3"># <text:s text:c="2"/>1 <text:s text:c="3"/>2 <text:s text:c="4"/>3 <text:s text:c="8"/>4 <text:s text:c="7"/>5 <text:s text:c="6"/>6 <text:s text:c="6"/>7 <text:s text:c="7"/>8 <text:s text:c="7"/>9 <text:s text:c="7"/>10 <text:s text:c="8"/>11</text:p>
      <text:p text:style-name="P3"># Seq;Power W;BatBMS V;BatCHG V;GRID V;GRID A;BatPers %;BatCur A;CHG tot AH;DIS tot AH;Pv AH</text:p>
      <text:p text:style-name="P3">plot "MBmonLog2026-05-28_17H06.csv" \</text:p>
      <text:p text:style-name="P3">using 1:4 with lines lw 1, '' \</text:p>
      <text:p text:style-name="P3">using 1:7 with lines axis x1y2 lw 1, '' \</text:p>
      <text:p text:style-name="P3">using 1:8 with lines axis x1y2 lw 1, '' \</text:p>
      <text:p text:style-name="P3">using 1:9 with lines axis x1y2 lw 1, '' \</text:p>
      <text:p text:style-name="P3">using 1:10 with lines axis x1y2 lw 1, '' <text:s/></text:p>
      <text:p text:style-name="P4"/>
      <text:p text:style-name="P4">And I get :</text:p>
      <text:p text:style-name="P4"/>
      <text:p text:style-name="P4"><draw:frame draw:style-name="fr1" draw:name="Image2" text:anchor-type="char" svg:width="16.484cm" svg:height="12.039cm" draw:z-index="1"><draw:image xlink:href="Pictures/100000000000026F000001C711B466FBF7FA686A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af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af" fo:country="ZA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30T13:03:31.766954600</dc:date>
    <meta:editing-duration>PT55M35S</meta:editing-duration>
    <meta:editing-cycles>1</meta:editing-cycles>
    <meta:generator>LibreOffice/7.4.7.2$Linux_X86_64 LibreOffice_project/40$Build-2</meta:generator>
    <meta:document-statistic meta:table-count="0" meta:image-count="2" meta:object-count="0" meta:page-count="2" meta:paragraph-count="43" meta:word-count="521" meta:character-count="3076" meta:non-whitespace-character-count="2467"/>
  </office:meta>
</office:document-meta>
</file>